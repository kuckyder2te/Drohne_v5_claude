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305cm" table:align="left"/>
    </style:style>
    <style:style style:name="Tabelle1.A" style:family="table-column">
      <style:table-column-properties style:column-width="2.586cm"/>
    </style:style>
    <style:style style:name="Tabelle1.B" style:family="table-column">
      <style:table-column-properties style:column-width="2.895cm"/>
    </style:style>
    <style:style style:name="Tabelle1.C" style:family="table-column">
      <style:table-column-properties style:column-width="3.824cm"/>
    </style:style>
    <style:style style:name="Tabelle1.A1" style:family="table-cell">
      <style:table-cell-properties style:vertical-align="middle" fo:padding="0.049cm" fo:border="none"/>
    </style:style>
    <style:style style:name="Tabelle3" style:family="table">
      <style:table-properties style:width="9.305cm" table:align="left"/>
    </style:style>
    <style:style style:name="Tabelle3.A" style:family="table-column">
      <style:table-column-properties style:column-width="2.586cm"/>
    </style:style>
    <style:style style:name="Tabelle3.B" style:family="table-column">
      <style:table-column-properties style:column-width="2.895cm"/>
    </style:style>
    <style:style style:name="Tabelle3.C" style:family="table-column">
      <style:table-column-properties style:column-width="3.824cm"/>
    </style:style>
    <style:style style:name="Tabelle3.A1" style:family="table-cell">
      <style:table-cell-properties style:vertical-align="middle" fo:padding="0.049cm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4" text:outline-level="4">Pin-Zuordnung ICM-20948 Breakout → KiCad Symbol: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Breakout Pin</text:p>
            </table:table-cell>
            <table:table-cell table:style-name="Tabelle1.A1" office:value-type="string">
              <text:p text:style-name="Table_20_Heading">KiCad Pin</text:p>
            </table:table-cell>
            <table:table-cell table:style-name="Tabelle1.A1" office:value-type="string">
              <text:p text:style-name="Table_20_Heading">Funktion</text:p>
            </table:table-cell>
          </table:table-row>
        </table:table-header-rows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VIN<text:tab/>VDDIO+VDD<text:tab/>8/13<text:tab/>3v3 Versorgung</text:p>
      <text:p text:style-name="Standard">GND<text:tab/>GND<text:tab/>18<text:tab/>Masse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Contents">VIN</text:p>
            </table:table-cell>
            <table:table-cell table:style-name="Tabelle3.A1" office:value-type="string">
              <text:p text:style-name="Table_20_Contents">VDDIO + VDD</text:p>
            </table:table-cell>
            <table:table-cell table:style-name="Tabelle3.A1" office:value-type="string">
              <text:p text:style-name="Table_20_Contents"><text:s text:c="8"/>3.3V Versorgung</text:p>
            </table:table-cell>
          </table:table-row>
        </table:table-header-rows>
      </table:table>
      <text:p text:style-name="Standard">SDA<text:tab/>SDA/SDI<text:tab/>I²C Daten<text:tab/>24</text:p>
      <text:p text:style-name="Standard">SCL<text:tab/>SCL/SCLK<text:tab/>I²C Takt<text:tab/>23<text:line-break/>INT<text:tab/><text:span text:style-name="T2">INT1<text:tab/>Interrupt<text:tab/>12</text:span></text:p>
      <text:p text:style-name="Standard">SDO<text:tab/>SDO/AD0<text:tab/>I²C<text:tab/>9</text:p>
      <text:p text:style-name="Standard">CS<text:tab/>CS<text:tab/>SPI Chip Select<text:tab/>22</text:p>
      <text:p text:style-name="Standard">AD<text:tab/>SDO/AD0<text:tab/>Adresse (0x68/0x69)<text:tab/>9<text:line-break/>AC<text:tab/>AUX_CL<text:tab/>Magnetometer Takt<text:tab/>7</text:p>
      <text:p text:style-name="Standard">G<text:tab/>AUX_DA<text:tab/>Magnetometer Daten<text:tab/>21<text:line-break/>FS<text:tab/>FSYNC<text:tab/>Frame Sync<text:tab/>11</text:p>
      <text:p text:style-name="Standard">1V8<text:tab/>REGOUT<text:tab/>1.8V Ausgang<text:tab/>10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2S</meta:editing-duration>
    <meta:editing-cycles>4</meta:editing-cycles>
    <meta:generator>OpenOffice/4.1.15$Win32 OpenOffice.org_project/4115m2$Build-9813</meta:generator>
    <dc:date>2026-06-23T22:45:37.35</dc:date>
    <dc:creator>Wilhelm Kuckelsberg</dc:creator>
    <meta:document-statistic meta:table-count="2" meta:image-count="0" meta:object-count="0" meta:page-count="1" meta:paragraph-count="16" meta:word-count="81" meta:character-count="416"/>
    <meta:user-defined meta:name="Info 1"/>
    <meta:user-defined meta:name="Info 2"/>
    <meta:user-defined meta:name="Info 3"/>
    <meta:user-defined meta:name="Info 4"/>
  </office:meta>
</office:document-meta>
</file>